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ttn : departamentul ILUMINAT STRADAL</text:p>
      <text:p text:style-name="Standard"/>
      <text:p text:style-name="Standard">Buna ziua,</text:p>
      <text:p text:style-name="Standard">Va scriu in numele firmei Technology Transfer Office Ltd</text:p>
      <text:p text:style-name="Standard">http://www.checkcompany.co.uk/company/11780686/TECHNOLOGY-TRANSFER-OFFICELIMITED ) .</text:p>
      <text:p text:style-name="Standard">Ni s-a cerut o evaluare a nevoilor departamentelor de iluminat public din primarii diverse de catre un</text:p>
      <text:p text:style-name="Standard">client care produce corpuri de iluminat (LED) , ca si</text:p>
      <text:p text:style-name="Standard">– sisteme de telegestiune inteligente pentru iluminat stradal (softul de monitorizare</text:p>
      <text:p text:style-name="Standard">micsoreaza lumina dupa 12.00 PM, mareste lumina cind trece masina sau pieton, taie lumina</text:p>
      <text:p text:style-name="Standard">cind e soare., monitorizeaza si controleaza parametri tehnici prin telegestiune , anunta posibile</text:p>
      <text:p text:style-name="Standard">racordari ilegale, poate reduce emisii de CO2 , poate reduce poluarea luminoasa etc ) ,</text:p>
      <text:p text:style-name="Standard">– sisteme de telegestiune inteligente pentru incalzirea cladirilor ( incepe sa incalzeasca biroul</text:p>
      <text:p text:style-name="Standard">angajatului doar cu 30 minute inainte de a veni la servici, nu incalzeste cind e angajatul in</text:p>
      <text:p text:style-name="Standard">concediu, trimite alarme atunci cind creste temperatura prea mult sau cand scade temperatura</text:p>
      <text:p text:style-name="Standard">prea mult ( se uita o usa deschisa ) etc</text:p>
      <text:p text:style-name="Standard">– ca si contoare inteligente ( trimit consumul singure, anunta automat cind e consumul mai mare</text:p>
      <text:p text:style-name="Standard">decit media, anunta posibile furturi de energie etc )</text:p>
      <text:p text:style-name="Standard">Clientul este companie romaneasca si initial am decis sa contactam primarii din Romania – fie care se</text:p>
      <text:p text:style-name="Standard">ocupa de gestiunea directa, fie prin gestiune delegata. ( In cazul gestiunii delegate, va rugam sa trimiteti</text:p>
      <text:p text:style-name="Standard">aceasta scrisoare catre operatorul desemnat de Dvs. )</text:p>
      <text:p text:style-name="Standard">Va rog sa-mi trimiteti, prin email, la adresa telegestiuneprimarii@gmail.com cerintele dvs</text:p>
      <text:p text:style-name="Standard">privind iluminatul public, incalzirea cladirilor ca si eficienta energetica ca si persoana de contact din</text:p>
      <text:p text:style-name="Standard">cadrul Primariei.</text:p>
      <text:p text:style-name="Standard"/>
      <text:p text:style-name="Standard">Cu deosebit respect,</text:p>
      <text:p text:style-name="Standard">Tudor Seicarescu</text:p>
      <text:p text:style-name="Standard">Technology Transfer Office Ltd</text:p>
      <text:p text:style-name="Standard">tudor@seicarescu.co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8T17:27:14.321000000</meta:creation-date>
    <dc:date>2023-02-08T17:55:18.883000000</dc:date>
    <meta:editing-duration>PT26M39S</meta:editing-duration>
    <meta:editing-cycles>1</meta:editing-cycles>
    <meta:document-statistic meta:table-count="0" meta:image-count="0" meta:object-count="0" meta:page-count="1" meta:paragraph-count="26" meta:word-count="253" meta:character-count="1730" meta:non-whitespace-character-count="1499"/>
    <meta:generator>LibreOffice/7.4.5.1$Windows_X86_64 LibreOffice_project/9c0871452b3918c1019dde9bfac75448afc4b57f</meta:generator>
  </office:meta>
</office:document-meta>
</file>