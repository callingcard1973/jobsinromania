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74151" style:font-name="S hne" fo:font-size="12pt" fo:letter-spacing="normal" fo:font-style="normal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style:font-name="S hne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mpelling call-to-action (CTA) messages</text:span> </text:p>
      <text:p text:style-name="P1"/>
      <text:p text:style-name="P1"/>
      <text:p text:style-name="P4">CTA 1: Message: "Illuminate Your City's Brilliance" Button Design: A button with a city skyline silhouette and a radiant glow, inviting users to take action.</text:p>
      <text:p text:style-name="P3">CTA 2: Message: "Transform Your Urban Nightscape" Button Design: A button with a transition from a dimly lit city to a vibrant, well-lit cityscape, emphasizing transformation.</text:p>
      <text:p text:style-name="P3">CTA 3: Message: "Experience Intelligent Urban Illumination" Button Design: A button featuring a light bulb merged with city elements, highlighting innovation and intelligence.</text:p>
      <text:p text:style-name="P3">CTA 4: Message: "Elevate Sustainability with Bright Solutions" Button Design: A button combining leaves (symbolizing sustainability) with light beams, promoting eco-friendly choices.</text:p>
      <text:p text:style-name="P3">CTA 5: Message: "Let Your City Shine Brighter!" Button Design: A button with a prominent spotlight effect on the text, inspiring users to embrace brilliant lighti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0T08:57:55.52</meta:creation-date>
    <meta:document-statistic meta:table-count="0" meta:image-count="0" meta:object-count="0" meta:page-count="1" meta:paragraph-count="6" meta:word-count="126" meta:character-count="895"/>
    <dc:date>2023-08-10T08:58:46.82</dc:date>
    <meta:editing-duration>PT51S</meta:editing-duration>
    <meta:editing-cycles>1</meta:editing-cycles>
    <meta:generator>OpenOffice/4.1.14$Win32 OpenOffice.org_project/4114m1$Build-9811</meta:generator>
  </office:meta>
</office:document-meta>
</file>