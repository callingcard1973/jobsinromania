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padding="0.0193in" fo:border="0.0008in solid #d9d9e3"/>
    </style:style>
    <style:style style:name="P2" style:family="paragraph" style:parent-style-name="Text_20_body" style:list-style-name="L1">
      <style:paragraph-properties fo:padding="0.0193in" fo:border="0.0008in solid #d9d9e3"/>
    </style:style>
    <style:style style:name="P3" style:family="paragraph" style:parent-style-name="Text_20_body" style:list-style-name="L2">
      <style:paragraph-properties fo:padding="0.0193in" fo:border="0.0008in solid #d9d9e3"/>
    </style:style>
    <style:style style:name="P4" style:family="paragraph" style:parent-style-name="Text_20_body" style:list-style-name="L3">
      <style:paragraph-properties fo:padding="0.0193in" fo:border="0.0008in solid #d9d9e3"/>
    </style:style>
    <style:style style:name="P5" style:family="paragraph" style:parent-style-name="Heading_20_3">
      <style:paragraph-properties fo:padding="0.0193in" fo:border="0.0008in solid #d9d9e3"/>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Strong_20_Emphasis">Market Analysis for Net System Engineering's "net-Lighting"</text:span></text:h>
      <text:h text:style-name="P5" text:outline-level="3"><text:span text:style-name="Strong_20_Emphasis">Market Overview:</text:span></text:h>
      <text:p text:style-name="P1">The European lighting market is rapidly evolving, driven by technological advancements and a growing focus on energy efficiency and sustainability. As countries within the European Union strive to meet their energy consumption and carbon reduction targets, the demand for intelligent lighting solutions has surged. Net System Engineering's "net-Lighting" is well-positioned to capitalize on this market shift.</text:p>
      <text:h text:style-name="P5" text:outline-level="3"><text:span text:style-name="Strong_20_Emphasis">Market Trends:</text:span></text:h>
      <text:list xml:id="list4245910818537910701" text:style-name="L1">
        <text:list-item>
          <text:p text:style-name="P2"><text:span text:style-name="Strong_20_Emphasis">IoT Integration:</text:span> The Internet of Things (IoT) is revolutionizing the lighting industry. The ability to remotely manage and monitor lighting systems has become essential, leading to increased demand for smart lighting solutions like "net-Lighting."</text:p>
        </text:list-item>
        <text:list-item>
          <text:p text:style-name="P2"><text:span text:style-name="Strong_20_Emphasis">Energy Efficiency:</text:span> European governments have implemented stringent regulations and initiatives to promote energy-efficient lighting solutions. "net-Lighting" aligns with these goals by offering energy savings through dynamic light intensity adjustments and reduced standby consumption.</text:p>
        </text:list-item>
        <text:list-item>
          <text:p text:style-name="P2"><text:span text:style-name="Strong_20_Emphasis">Sustainability:</text:span> Consumers and businesses alike are prioritizing sustainable practices. "net-Lighting" contributes to reduced energy consumption, leading to a smaller carbon footprint and aligning with sustainability goals.</text:p>
        </text:list-item>
        <text:list-item>
          <text:p text:style-name="P2"><text:span text:style-name="Strong_20_Emphasis">Data-Driven Decision-Making:</text:span> The ability to gather real-time data from lighting systems and use it for analysis and optimization is highly valued. "net-Lighting" offers advanced monitoring and reporting capabilities, aiding in better decision-making.</text:p>
        </text:list-item>
      </text:list>
      <text:h text:style-name="P5" text:outline-level="3"><text:span text:style-name="Strong_20_Emphasis">Target Market:</text:span></text:h>
      <text:list xml:id="list1966135342924324901" text:style-name="L2">
        <text:list-item>
          <text:p text:style-name="P3"><text:span text:style-name="Strong_20_Emphasis">Municipalities and Governments:</text:span> Public lighting systems in cities and towns across Europe can benefit from the energy savings and remote management capabilities of "net-Lighting." Additionally, governments are often committed to meeting environmental targets, making the solution appealing.</text:p>
        </text:list-item>
        <text:list-item>
          <text:p text:style-name="P3"><text:span text:style-name="Strong_20_Emphasis">Commercial and Industrial Sectors:</text:span> Factories, warehouses, offices, and retail spaces are increasingly adopting smart lighting solutions to reduce operating costs and enhance workplace environments.</text:p>
        </text:list-item>
        <text:list-item>
          <text:p text:style-name="P3"><text:span text:style-name="Strong_20_Emphasis">Transportation Infrastructure:</text:span> "net-Lighting" can be applied to streetlights, tunnels, and other transportation-related lighting, contributing to safer and more energy-efficient infrastructure.</text:p>
        </text:list-item>
      </text:list>
      <text:h text:style-name="P5" text:outline-level="3"><text:span text:style-name="Strong_20_Emphasis">Competitive Landscape:</text:span></text:h>
      <text:p text:style-name="P1">Net System Engineering faces competition from both established lighting manufacturers and emerging IoT companies. However, its patented technology, focus on energy savings, and remote management capabilities provide a competitive edge. Few solutions offer the same level of compatibility and seamless integration with existing power lines and lighting infrastructure.</text:p>
      <text:h text:style-name="P5" text:outline-level="3"><text:soft-page-break/><text:span text:style-name="Strong_20_Emphasis">Key Success Factors:</text:span></text:h>
      <text:list xml:id="list4589603660314296801" text:style-name="L3">
        <text:list-item>
          <text:p text:style-name="P4"><text:span text:style-name="Strong_20_Emphasis">Patented Technology:</text:span> The patented technology of "net-Lighting" gives Net System Engineering a unique selling proposition, setting it apart from competitors.</text:p>
        </text:list-item>
        <text:list-item>
          <text:p text:style-name="P4"><text:span text:style-name="Strong_20_Emphasis">Energy Savings:</text:span> "net-Lighting" delivers substantial energy savings, which is a critical factor for both cost-conscious consumers and environmentally conscious entities.</text:p>
        </text:list-item>
        <text:list-item>
          <text:p text:style-name="P4"><text:span text:style-name="Strong_20_Emphasis">Remote Management:</text:span> The ability to remotely manage lighting systems through the cloud offers convenience and efficiency, making it an attractive feature for various market segments.</text:p>
        </text:list-item>
      </text:list>
      <text:h text:style-name="P5" text:outline-level="3"><text:span text:style-name="Strong_20_Emphasis">Regulatory Considerations:</text:span></text:h>
      <text:p text:style-name="P1">European regulations regarding energy efficiency and sustainability standards for lighting products are robust. Net System Engineering must ensure that "net-Lighting" complies with these regulations and is eligible for any relevant incentives or certifications.</text:p>
      <text:h text:style-name="P5" text:outline-level="3"><text:span text:style-name="Strong_20_Emphasis">Conclusion:</text:span></text:h>
      <text:p text:style-name="P1">The European market for intelligent lighting solutions is ripe for innovation, driven by energy efficiency goals, sustainability initiatives, and the adoption of IoT technologies. Net System Engineering's "net-Lighting" stands to capture a significant share of this market by offering a patented, energy-efficient, and remotely managed solution that addresses the evolving needs of both public and industrial sectors. A targeted marketing and sales approach will be crucial to capitalize on these favorable market condit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8-10T07:34:49.29</meta:creation-date>
    <meta:document-statistic meta:table-count="0" meta:image-count="0" meta:object-count="0" meta:page-count="2" meta:paragraph-count="22" meta:word-count="512" meta:character-count="3952"/>
    <dc:date>2023-08-10T07:35:03.03</dc:date>
    <meta:editing-duration>PT13S</meta:editing-duration>
    <meta:editing-cycles>1</meta:editing-cycles>
    <meta:generator>OpenOffice/4.1.14$Win32 OpenOffice.org_project/4114m1$Build-9811</meta:generator>
  </office:meta>
</office:document-meta>
</file>