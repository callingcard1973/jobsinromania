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1">
      <style:paragraph-properties fo:margin-top="0in" fo:margin-bottom="0in" fo:padding="0.0193in" fo:border="0.0008in solid #d9d9e3"/>
    </style:style>
    <style:style style:name="P6" style:family="paragraph" style:parent-style-name="Text_20_body" style:list-style-name="L2">
      <style:paragraph-properties fo:margin-top="0in" fo:margin-bottom="0in" fo:padding="0.0193in" fo:border="0.0008in solid #d9d9e3"/>
    </style:style>
    <style:style style:name="P7" style:family="paragraph" style:parent-style-name="Text_20_body" style:list-style-name="L3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![Net System Engineering Logo]</text:p>
      <text:p text:style-name="P1"><text:span text:style-name="Strong_20_Emphasis">Introducing net-Lighting: Illuminate the Future</text:span></text:p>
      <text:p text:style-name="P1">Unlock the Power of Intelligent Lighting with net-Lighting by Net System Engineering</text:p>
      <text:p text:style-name="P1">![Image of net-Lighting]</text:p>
      <text:p text:style-name="P1"><text:span text:style-name="Strong_20_Emphasis">Experience Innovation and Efficiency:</text:span> Upgrade your lighting infrastructure with net-Lighting, the cutting-edge IoT solution designed to revolutionize how you manage lighting.</text:p>
      <text:p text:style-name="P1"><text:span text:style-name="Strong_20_Emphasis">Key Benefits:</text:span></text:p>
      <text:list xml:id="list859374437144529015" text:style-name="L1">
        <text:list-item>
          <text:p text:style-name="P5">? <text:span text:style-name="Strong_20_Emphasis">True Green Technology:</text:span> Enjoy a zero Watt stand-by mode for maximum energy savings.</text:p>
        </text:list-item>
        <text:list-item>
          <text:p text:style-name="P5">? <text:span text:style-name="Strong_20_Emphasis">Cloud-Based Management:</text:span> Control and monitor your lighting remotely, anytime, anywhere.</text:p>
        </text:list-item>
        <text:list-item>
          <text:p text:style-name="P5">? <text:span text:style-name="Strong_20_Emphasis">Seamless Integration:</text:span> Works with existing power lines and lamp types, reducing installation time and costs.</text:p>
        </text:list-item>
        <text:list-item>
          <text:p text:style-name="P2">? <text:span text:style-name="Strong_20_Emphasis">Real-Time Analysis:</text:span> Gain insights into energy consumption and optimize maintenance strategies.</text:p>
        </text:list-item>
      </text:list>
      <text:p text:style-name="P1">![Icons of benefits]</text:p>
      <text:p text:style-name="P1"><text:span text:style-name="Strong_20_Emphasis">Ideal for Public and Industrial Sectors:</text:span> Whether you're a municipality, business, or organization, net-Lighting adapts to your needs, offering tailored solutions for energy efficiency and intelligent lighting management.</text:p>
      <text:p text:style-name="P1"><text:span text:style-name="Strong_20_Emphasis">Stand Out Features:</text:span></text:p>
      <text:list xml:id="list6043274299304075229" text:style-name="L2">
        <text:list-item>
          <text:p text:style-name="P6">? Dynamic Light Intensity Control</text:p>
        </text:list-item>
        <text:list-item>
          <text:p text:style-name="P6">? Remote Monitoring and Control</text:p>
        </text:list-item>
        <text:list-item>
          <text:p text:style-name="P3">?￯ﾸﾏ Advanced Maintenance Planning</text:p>
        </text:list-item>
      </text:list>
      <text:p text:style-name="P1">![Icons of features]</text:p>
      <text:p text:style-name="P1"><text:span text:style-name="Strong_20_Emphasis">Why Choose net-Lighting?</text:span></text:p>
      <text:list xml:id="list809465169145834073" text:style-name="L3">
        <text:list-item>
          <text:p text:style-name="P7">✔️ Proven Energy Savings</text:p>
        </text:list-item>
        <text:list-item>
          <text:p text:style-name="P7">✔️ Future-Ready IoT Technology</text:p>
        </text:list-item>
        <text:list-item>
          <text:p text:style-name="P7">✔️ Easy Integration with Existing Systems</text:p>
        </text:list-item>
        <text:list-item>
          <text:p text:style-name="P4">✔️ Simplified Maintenance and Management</text:p>
        </text:list-item>
      </text:list>
      <text:p text:style-name="P1">![Icons of reasons to choose]</text:p>
      <text:p text:style-name="P1"><text:span text:style-name="Strong_20_Emphasis">Join the Illumination Revolution!</text:span> Upgrade to net-Lighting and experience smarter, greener, and more efficient lighting management.</text:p>
      <text:p text:style-name="P1"><text:span text:style-name="Strong_20_Emphasis">Contact Us Today:</text:span> Phone: [Phone Number] Email: [Email Address] Website: [Website URL]</text:p>
      <text:p text:style-name="P1">![Contact Information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0T07:41:14.33</meta:creation-date>
    <meta:document-statistic meta:table-count="0" meta:image-count="0" meta:object-count="0" meta:page-count="1" meta:paragraph-count="26" meta:word-count="222" meta:character-count="1562"/>
    <dc:date>2023-08-10T07:41:34.96</dc:date>
    <meta:editing-duration>PT20S</meta:editing-duration>
    <meta:editing-cycles>1</meta:editing-cycles>
    <meta:generator>OpenOffice/4.1.14$Win32 OpenOffice.org_project/4114m1$Build-9811</meta:generator>
  </office:meta>
</office:document-meta>
</file>